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" style:family="paragraph" style:parent-style-name="Heading_20_4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 Text" fo:font-weight="bold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style:font-name="Google Sans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font-name="Google Sans Text"/>
    </style:style>
    <style:style style:name="T5" style:family="text">
      <style:text-properties style:font-name="Google Sans Text" fo:font-weight="bold"/>
    </style:style>
    <style:style style:name="T6" style:family="text">
      <style:text-properties style:font-name="Google Sans Tex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Relatório de Conclusão: Semana 1 (Teoria Enxuta)</text:span></text:h>
      <text:h text:style-name="P2" text:outline-level="3"><text:span text:style-name="T1">Fase 1: O "Cérebro" da IA (Dias 1 a 4)</text:span></text:h>
      <text:h text:style-name="P3" text:outline-level="4">Dia 1: O Panorama Geral (AI for Everyone)</text:h>
      <text:list text:style-name="L1">
        <text:list-item>
          <text:p text:style-name="P4"><text:span text:style-name="T2">O que foi abordado:</text:span> Entendimento do ecossistema de IA, separando o <text:span text:style-name="T3">hype</text:span> da realidade. Foco total em compreender as limitações atuais: o que a IA <text:span text:style-name="T2">não</text:span> consegue fazer (ex: tarefas que exigem raciocínio causal complexo, empatia real ou generalização fora dos dados de treino).</text:p>
        </text:list-item>
        <text:list-item>
          <text:p text:style-name="P4"><text:span text:style-name="T2">Emoji:</text:span> 🌐</text:p>
        </text:list-item>
        <text:list-item>
          <text:p text:style-name="P4"><text:span text:style-name="T2">Sugestão de Imagem:</text:span> Um gráfico de círculos concêntricos (Venn Diagram) mostrando a intersecção e limites entre <text:span text:style-name="T3">Artificial Intelligence</text:span>, <text:span text:style-name="T3">Machine Learning</text:span> e <text:span text:style-name="T3">Deep Learning</text:span>.</text:p>
        </text:list-item>
      </text:list>
      <text:h text:style-name="P3" text:outline-level="4">Dia 2: A Matemática das Escolhas</text:h>
      <text:list text:style-name="L2">
        <text:list-item>
          <text:p text:style-name="P5"><text:span text:style-name="T2">O que foi abordado:</text:span> A base matemática que sustenta as decisões dos modelos. Fórmulas de regressão e o papel crucial dos <text:span text:style-name="T2">Weights (Pesos)</text:span> e <text:span text:style-name="T2">Biases (Viéses)</text:span>, que atuam como os botões de ajuste fino para dar mais ou menos importância a variáveis específicas do código.</text:p>
        </text:list-item>
        <text:list-item>
          <text:p text:style-name="P5"><text:span text:style-name="T2">Emoji:</text:span> 📐</text:p>
        </text:list-item>
        <text:list-item>
          <text:p text:style-name="P5"><text:span text:style-name="T2">Sugestão de Imagem:</text:span> O gráfico clássico de uma reta de regressão linear tentando cruzar pontos dispersos no plano cartesiano, com setas indicando o ajuste dos coeficientes.</text:p>
        </text:list-item>
      </text:list>
      <text:h text:style-name="P3" text:outline-level="4">Dia 3: Deep Learning &amp; Redes Neurais de Sequência (RNNs)</text:h>
      <text:list text:style-name="L3">
        <text:list-item>
          <text:p text:style-name="P6"><text:span text:style-name="T2">O que foi abordado:</text:span> A evolução das funções encadeadas. A estrutura de camadas ocultas (<text:span text:style-name="T3">hidden layers</text:span>), os cálculos de ativação ($z$ e $a$) com foco na função <text:span text:style-name="T2">ReLU</text:span> para aceleração de treino, e o algoritmo de <text:span text:style-name="T2">Backpropagation</text:span> (derivadas da direita para a esquerda para ajustar pesos). Na sequência, o estudo de dados temporais/textuais com <text:span text:style-name="T2">RNNs, GRUs e LSTMs</text:span>, solucionando o problema do sumiço do gradiente (<text:span text:style-name="T3">vanishing gradients</text:span>).</text:p>
        </text:list-item>
        <text:list-item>
          <text:p text:style-name="P6"><text:span text:style-name="T2">Emoji:</text:span> 🧬</text:p>
        </text:list-item>
        <text:list-item>
          <text:p text:style-name="P6"><text:span text:style-name="T2">Sugestão de Imagem:</text:span> O diagrama clássico de uma Rede Neural Artificial (nós de input, camadas ocultas conectadas por linhas de "pesos", e nós de output) ao lado de um loop de uma célula RNN desdobrada no tempo.</text:p>
        </text:list-item>
      </text:list>
      <text:h text:style-name="P3" text:outline-level="4">Dia 4: O Divisor de Águas — Transformers &amp; Attention</text:h>
      <text:list text:style-name="L4">
        <text:list-item>
          <text:p text:style-name="P7"><text:span text:style-name="T2">O que foi abordado:</text:span> A transição das RNNs para a arquitetura moderna. O conceito de <text:span text:style-name="T2">Attention (Atenção)</text:span>, que permite ao modelo olhar para <text:soft-page-break/>todas as partes de um texto (ou código) simultaneamente, estabelecendo o contexto global. Compreensão de como algoritmos como <text:span text:style-name="T3">Beam Search</text:span> selecionam a próxima palavra/token mais provável. É a resposta teórica de como o Gemini "lê" arquivos inteiros e correlaciona erros.</text:p>
        </text:list-item>
        <text:list-item>
          <text:p text:style-name="P7"><text:span text:style-name="T2">Emoji:</text:span> ⚡</text:p>
        </text:list-item>
        <text:list-item>
          <text:p text:style-name="P7"><text:span text:style-name="T2">Sugestão de Imagem:</text:span> O famoso mapa de calor de "Attention" (linhas coloridas conectando palavras de uma frase em inglês e francês, mostrando como o modelo correlaciona o sujeito aos verbos distantes).</text:p>
        </text:list-item>
      </text:list>
      <text:p text:style-name="Horizontal_20_Line"/>
      <text:h text:style-name="P2" text:outline-level="3"><text:span text:style-name="T1">Fase 2: O "Mão na Massa" no Linux (Dias 5 e 6)</text:span></text:h>
      <text:h text:style-name="P3" text:outline-level="4">Dia 5: Tokenização e Embeddings</text:h>
      <text:list text:style-name="L5">
        <text:list-item>
          <text:p text:style-name="P8"><text:span text:style-name="T2">O que foi abordado:</text:span> A ponte entre o texto humano e a matemática de vetores. Como palavras e símbolos são quebrados em pedaços (<text:span text:style-name="T3">tokens</text:span>) e projetados em um espaço vetorial de alta dimensão (<text:span text:style-name="T2">Word2Vec, GloVe</text:span>). O entendimento de que palavras com significados semelhantes (ou códigos com funções parecidas) ficam geometricamente próximas nesse espaço.</text:p>
        </text:list-item>
        <text:list-item>
          <text:p text:style-name="P8"><text:span text:style-name="T2">Emoji:</text:span> 🔢</text:p>
        </text:list-item>
        <text:list-item>
          <text:p text:style-name="P10"><text:span text:style-name="T5">Sugestão de Imagem:</text:span><text:span text:style-name="T4"> Uma projeção em 3D de vetores de palavras (o clássico exemplo vetorial de: </text:span><text:span text:style-name="Source_20_Text"><text:span text:style-name="T4">Rei - Homem + Mulher = Rainha</text:span></text:span><text:span text:style-name="T4">).</text:span></text:p>
        </text:list-item>
      </text:list>
      <text:h text:style-name="P3" text:outline-level="4">Dia 6: Hugging Face (O "GitHub" da IA no Linux)</text:h>
      <text:list text:style-name="L6">
        <text:list-item>
          <text:p text:style-name="P9"><text:span text:style-name="T2">O que foi abordado:</text:span> A transição final para o terminal Linux. Navegação prática no Hugging Face Hub para explorar repositórios de modelos abertos (<text:span text:style-name="T3">Open Weights</text:span>) como <text:span text:style-name="T2">Llama-3</text:span> e <text:span text:style-name="T2">Mistral</text:span>. O entendimento técnico de como baixar, instanciar e preparar o ambiente operacional Linux para interagir com modelos locais.</text:p>
        </text:list-item>
        <text:list-item>
          <text:p text:style-name="P9"><text:span text:style-name="T2">Emoji:</text:span> 🤗 <text:span text:style-name="T3">(ou o pinguim do Linux 🐧)</text:span></text:p>
        </text:list-item>
        <text:list-item>
          <text:p text:style-name="P11"><text:span text:style-name="T5">Sugestão de Imagem:</text:span><text:span text:style-name="T4"> Um print de terminal Linux rodando um comando de download de modelo (via CLI do Hugging Face) ou a própria interface web do Hub destacando os arquivos de parâmetros </text:span><text:span text:style-name="Source_20_Text"><text:span text:style-name="T4">.gguf</text:span></text:span><text:span text:style-name="T4"> ou </text:span><text:span text:style-name="T6">safetensors</text:span><text:span text:style-name="T4">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15:26:33.285190603</meta:creation-date>
    <dc:date>2026-05-17T01:11:02.780675852</dc:date>
    <meta:editing-duration>PT9H34M17S</meta:editing-duration>
    <meta:editing-cycles>1</meta:editing-cycles>
    <meta:document-statistic meta:table-count="0" meta:image-count="0" meta:object-count="0" meta:page-count="2" meta:paragraph-count="27" meta:word-count="607" meta:character-count="3585" meta:non-whitespace-character-count="3022"/>
    <meta:generator>LibreOffice/24.2.7.2$Linux_X86_64 LibreOffice_project/420$Build-2</meta:generator>
  </office:meta>
</office:document-meta>
</file>